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3" style:family="table-column">
      <style:table-column-properties style:column-width="2.1638in"/>
    </style:style>
    <style:style style:name="TableColumn4" style:family="table-column">
      <style:table-column-properties style:column-width="2.1645in"/>
    </style:style>
    <style:style style:name="TableColumn5" style:family="table-column">
      <style:table-column-properties style:column-width="2.1645in"/>
    </style:style>
    <style:style style:name="Table2" style:family="table">
      <style:table-properties style:width="6.4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list-style-name="LFO1" style:family="paragraph"/>
    <style:style style:name="T28" style:parent-style-name="DefaultParagraphFont" style:family="text">
      <style:text-properties fo:font-weight="bold" style:font-weight-asian="bold" style:font-weight-complex="bold"/>
    </style:style>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T32" style:parent-style-name="DefaultParagraphFont" style:family="text">
      <style:text-properties fo:font-weight="bold" style:font-weight-asian="bold" style:font-weight-complex="bold"/>
    </style:style>
    <style:style style:name="P33" style:parent-style-name="Normal" style:list-style-name="LFO1" style:family="paragraph"/>
    <style:style style:name="T34" style:parent-style-name="DefaultParagraphFont" style:family="text">
      <style:text-properties fo:font-weight="bold" style:font-weight-asian="bold" style:font-weight-complex="bold"/>
    </style:style>
    <style:style style:name="P35" style:parent-style-name="Normal" style:list-style-name="LFO1" style:family="paragraph"/>
    <style:style style:name="T36" style:parent-style-name="DefaultParagraphFont" style:family="text">
      <style:text-properties fo:font-weight="bold" style:font-weight-asian="bold" style:font-weight-complex="bold"/>
    </style:style>
    <style:style style:name="P37" style:parent-style-name="Normal" style:list-style-name="LFO1" style:family="paragraph"/>
    <style:style style:name="T38" style:parent-style-name="DefaultParagraphFont" style:family="text">
      <style:text-properties fo:font-weight="bold" style:font-weight-asian="bold" style:font-weight-complex="bold"/>
    </style:style>
    <style:style style:name="P39" style:parent-style-name="Normal" style:list-style-name="LFO1" style:family="paragraph"/>
    <style:style style:name="T40" style:parent-style-name="DefaultParagraphFont" style:family="text">
      <style:text-properties fo:font-weight="bold" style:font-weight-asian="bold" style:font-weight-complex="bold"/>
    </style:style>
  </office:automatic-styles>
  <office:body>
    <office:text text:use-soft-page-breaks="true">
      <text:p text:style-name="P1">Summary of work<text:line-break/>Uplift Model: (T-learner is actually same as uplift model R scripts, just removed output part)<text:line-break/>Regenerated n=1000 dataset that can be used in Causal Forrest.</text:p>
      <text:p text:style-name="Normal">Added CV-based XGBoost and RGLM model<text:line-break/>For the simulated dataset, cross validation AUC are</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XGBoost</text:p>
          </table:table-cell>
          <table:table-cell table:style-name="TableCell11">
            <text:p text:style-name="P12">RGLM</text:p>
          </table:table-cell>
        </table:table-row>
        <table:table-row table:style-name="TableRow13">
          <table:table-cell table:style-name="TableCell14">
            <text:p text:style-name="P15">Treatment</text:p>
          </table:table-cell>
          <table:table-cell table:style-name="TableCell16">
            <text:p text:style-name="P17">0.530</text:p>
          </table:table-cell>
          <table:table-cell table:style-name="TableCell18">
            <text:p text:style-name="P19">0.802</text:p>
          </table:table-cell>
        </table:table-row>
        <table:table-row table:style-name="TableRow20">
          <table:table-cell table:style-name="TableCell21">
            <text:p text:style-name="P22">Control</text:p>
          </table:table-cell>
          <table:table-cell table:style-name="TableCell23">
            <text:p text:style-name="P24">0.600</text:p>
          </table:table-cell>
          <table:table-cell table:style-name="TableCell25">
            <text:p text:style-name="P26">0.580</text:p>
          </table:table-cell>
        </table:table-row>
      </table:table>
      <text:p text:style-name="Normal"/>
      <text:p text:style-name="Normal">Causal Forest:<text:s/><text:line-break/>Average treat effect: -0.046<text:line-break/>other output: Variable Importance, some scores<text:s/>(production score, giving<text:s/>every member in the dataset a treatment-effect estimate)<text:line-break/><text:line-break/>So far, current_risk_score, risk_tier, and related variables are being used as inputs in the simulated datasets. This warrants additional review. According to the PRISM methodology, baseline risk scores are derived from factors such as prior ED visits, chronic conditions, utilization history, and other member characteristics. Notably, the baseline risk-modeling step itself does not appear to be implemented in the current R scripts; instead, risk-score variables are assumed to already exist in the input data.</text:p>
      <text:p text:style-name="Normal">If the same underlying variables used to generate the baseline risk score are also included as predictors in the uplift, causal forest, or doubly robust models, then including both the derived risk score (e.g., current_risk_score, risk_tier) and its component variables may introduce redundancy, double-counting of information, or potential information leakage. This could make it more difficult to interpret feature importance and treatment-effect drivers.</text:p>
      <text:p text:style-name="Normal">We should verify how the risk score was constructed, whether it was generated exclusively from pre-intervention data, whether any treatment-related variables were included in its calculation, and whether model performance or treatment-effect estimates materially change when the risk-score variables are excluded from the causal models.</text:p>
      <text:p text:style-name="Normal"/>
      <text:p text:style-name="Normal">Beyond the baseline risk model, the current scripts already cover most of the core causal modeling components (uplift modeling, counterfactual estimation, causal forests, policy simulation, and basic explainability). However, several capabilities described in the PRISM methodology are either missing or only partially implemented.</text:p>
      <text:soft-page-break/>
      <text:p text:style-name="Normal">Key enhancements include:</text:p>
      <text:list text:style-name="LFO1" text:continue-numbering="true">
        <text:list-item>
          <text:p text:style-name="P27"><text:span text:style-name="T28">Action recommendation layer:</text:span><text:s/>The Doubly Robust model already supports decision-making through benefit rankings and policy simulations that compare alternative targeting strategies. However, the outputs remain analytical rather than operational. The current scripts do not appear to generate explicit intervention recommendations, decision thresholds, or capacity-aware targeting lists that can be directly consumed by case management teams. A production implementation could extend the existing policy simulation framework to output recommended actions and targeting thresholds based on expected benefit, ROI, and operational constraints.</text:p>
        </text:list-item>
        <text:list-item>
          <text:p text:style-name="P29"><text:span text:style-name="T30">Sleeping Dog identification:</text:span><text:s/>Explicitly identify members predicted to have negative treatment effects rather than requiring manual interpretation of negative uplift or treatment-effect scores.<text:s/></text:p>
        </text:list-item>
        <text:list-item>
          <text:p text:style-name="P31"><text:span text:style-name="T32">Explainability narrative layer:</text:span><text:s/>The PowerPoint describes an LLM-supported explanation layer, but the current scripts stop at SHAP values and variable importance without generating human-readable recommendations.<text:s/></text:p>
        </text:list-item>
        <text:list-item>
          <text:p text:style-name="P33"><text:span text:style-name="T34">Uncertainty estimates:</text:span><text:s/>Add confidence intervals or probability-of-benefit measures alongside treatment-effect estimates to support decision-making.<text:s/></text:p>
        </text:list-item>
        <text:list-item>
          <text:p text:style-name="P35"><text:span text:style-name="T36">Intervention comparison:</text:span><text:s/>Current models assume a single intervention; future versions could compare multiple intervention types and recommend the most effective option for each member.<text:s/></text:p>
        </text:list-item>
        <text:list-item>
          <text:p text:style-name="P37"><text:span text:style-name="T38">Automated subgroup discovery:</text:span><text:s/>Move beyond decile rankings and generate named, interpretable high-value subgroups with estimated treatment effects and ROI.<text:s/></text:p>
        </text:list-item>
        <text:list-item>
          <text:p text:style-name="P39"><text:span text:style-name="T40">Capacity-constrained optimization:</text:span><text:s/>Extend policy simulation to account for real operational constraints (e.g., limited case management capacity) and optimize targeting under those limits.<text:s/></text:p>
        </text:list-item>
      </text:list>
      <text:p text:style-name="Normal">Overall, the current implementation provides strong causal estimation and targeting capabilities, while the next phase should focus on decision support, interpretability, and operational deployment.</text:p>
      <text:p text:style-name="Normal"><text:line-break/></text:p>
      <text:soft-page-break/>
      <text:p text:style-name="Normal"><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ui Huang</meta:initial-creator>
    <dc:creator>Rui Huang</dc:creator>
    <meta:creation-date>2026-06-04T14:47:00Z</meta:creation-date>
    <dc:date>2026-06-04T21:12:00Z</dc:date>
    <meta:template xlink:href="Normal" xlink:type="simple"/>
    <meta:editing-cycles>9</meta:editing-cycles>
    <meta:editing-duration>PT12000S</meta:editing-duration>
    <meta:document-statistic meta:page-count="3" meta:paragraph-count="8" meta:word-count="611" meta:character-count="4090" meta:row-count="29" meta:non-whitespace-character-count="3487"/>
  </office:meta>
</office:document-meta>
</file>